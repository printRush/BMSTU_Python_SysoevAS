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Содержимое_20_таблицы_20_по_20_центру">
      <style:text-properties officeooo:rsid="0027c778" officeooo:paragraph-rsid="0027c778"/>
    </style:style>
    <style:style style:name="P1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Contents_20_Heading" style:master-page-name="First_20_Page">
      <style:paragraph-properties style:page-number="1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31d59c" officeooo:paragraph-rsid="0031d59c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2dab83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31d59c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ru" fo:country="RU" fo:font-weight="bold" officeooo:paragraph-rsid="002dab8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ru" fo:country="RU" fo:font-weight="bold" officeooo:paragraph-rsid="0031d59c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2dab83"/>
    </style:style>
    <style:style style:name="P24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31d59c"/>
    </style:style>
    <style:style style:name="P25" style:family="paragraph" style:parent-style-name="Standard">
      <style:paragraph-properties fo:line-height="150%"/>
      <style:text-properties officeooo:paragraph-rsid="002dab83"/>
    </style:style>
    <style:style style:name="P26" style:family="paragraph" style:parent-style-name="Standard">
      <style:paragraph-properties fo:line-height="150%"/>
      <style:text-properties officeooo:paragraph-rsid="0031d59c"/>
    </style:style>
    <style:style style:name="P27" style:family="paragraph" style:parent-style-name="Text_20_body">
      <style:paragraph-properties fo:text-align="center" style:justify-single-word="false"/>
      <style:text-properties fo:language="ru" fo:country="RU" officeooo:rsid="0023e910" officeooo:paragraph-rsid="0017c942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23e910" officeooo:paragraph-rsid="0031d59c"/>
    </style:style>
    <style:style style:name="P30" style:family="paragraph" style:parent-style-name="Text_20_body">
      <style:text-properties fo:language="ru" fo:country="RU" officeooo:rsid="0023e910" officeooo:paragraph-rsid="0017c942"/>
    </style:style>
    <style:style style:name="P31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officeooo:rsid="0031210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dab83"/>
    </style:style>
    <style:style style:name="T4" style:family="text">
      <style:text-properties fo:language="ru" fo:country="RU" officeooo:rsid="0031d59c"/>
    </style:style>
    <style:style style:name="T5" style:family="text">
      <style:text-properties officeooo:rsid="002c0e4a"/>
    </style:style>
    <style:style style:name="T6" style:family="text">
      <style:text-properties officeooo:rsid="002cb101"/>
    </style:style>
    <style:style style:name="T7" style:family="text">
      <style:text-properties officeooo:rsid="002dab83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officeooo:rsid="0028f36d" style:font-weight-asian="normal" style:font-weight-complex="normal"/>
    </style:style>
    <style:style style:name="T10" style:family="text">
      <style:text-properties officeooo:rsid="002eb696"/>
    </style:style>
    <style:style style:name="T11" style:family="text">
      <style:text-properties officeooo:rsid="0031d59c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6">1</text:span><text:span text:style-name="T11">5</text:span></text:p>
      <text:p text:style-name="Standard"/>
      <text:p text:style-name="P10"><text:span text:style-name="T2">Тема лабораторной работы: </text:span><text:span text:style-name="T4">Работа с памятью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6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4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5"><text:a xlink:type="simple" xlink:href="#__RefHeading___Toc1116_1594055144" text:style-name="Index_20_Link" text:visited-style-name="Index_20_Link">Постановка задачи<text:tab/>2</text:a></text:p>
          <text:p text:style-name="P15"><text:a xlink:type="simple" xlink:href="#__RefHeading___Toc1118_1594055144" text:style-name="Index_20_Link" text:visited-style-name="Index_20_Link">Теоретическая часть<text:tab/></text:a><text:span text:style-name="T6">2</text:span></text:p>
          <text:p text:style-name="P18">Ход выполнения работы<text:tab/>3</text:p>
          <text:p text:style-name="P15"><text:a xlink:type="simple" xlink:href="#__RefHeading___Toc1126_1594055144" text:style-name="Index_20_Link" text:visited-style-name="Index_20_Link">Листинг программы<text:tab/></text:a><text:span text:style-name="T11">4</text:span></text:p>
          <text:p text:style-name="P15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10">4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/>
      <text:p text:style-name="P31"><text:soft-page-break/>Постановка задачи</text:p>
      <text:p text:style-name="P28">1. Изучить механизмы работы с памятью в Python на примере стандартного списка (list).</text:p>
      <text:p text:style-name="P28">2. Реализовать собственный динамический массив (аналог списка) с использованием модуля ctypes для работы с низкоуровневой памятью.</text:p>
      <text:p text:style-name="P28">3. Исследовать поведение выделения памяти при добавлении и удалении элементов.</text:p>
      <text:p text:style-name="P28"/>
      <text:p text:style-name="P31">Теоретическая часть</text:p>
      <text:p text:style-name="P28"/>
      <text:p text:style-name="P28">Управление памятью в Python</text:p>
      <text:p text:style-name="P28">Python автоматически управляет памятью с помощью механизма подсчета ссылок и сборщика мусора. Каждый объект в Python хранится в куче (heap), а переменные содержат ссылки на эти объекты.</text:p>
      <text:p text:style-name="P28">Функция id() возвращает уникальный идентификатор объекта, который в CPython представляет собой адрес объекта в памяти. Функция hex() позволяет представить этот адрес в шестнадцатеричной системе счисления.</text:p>
      <text:p text:style-name="P28"/>
      <text:p text:style-name="P28">Модуль ctypes</text:p>
      <text:p text:style-name="P28">Модуль ctypes предоставляет возможность работать с C-типами данных и низкоуровневой памятью напрямую. Функция ctypes.cast() позволяет преобразовать адрес памяти в объект Python. Тип ctypes.py_object используется для хранения ссылок на объекты Python в массиве.</text:p>
      <text:p text:style-name="P28"/>
      <text:p text:style-name="P28">Динамический массив</text:p>
      <text:p text:style-name="P28"/>
      <text:p text:style-name="P28">Динамический массив — это структура данных, которая автоматически изменяет свой размер при добавлении или удалении элементов. Основные принципы:</text:p>
      <text:p text:style-name="P28">- При создании массива выделяется начальная емкость (capacity)</text:p>
      <text:p text:style-name="P29">- Фактическое количество элементов хранится в переменной length</text:p>
      <text:p text:style-name="P29"><text:soft-page-break/>- При добавлении элемента, если length == capacity, массив расширяется (обычно в 2 раза)</text:p>
      <text:p text:style-name="P28">- При удалении элемента, если length становится значительно меньше capacity, массив может сжиматься</text:p>
      <text:p text:style-name="P28">Функция sys.getsizeof() возвращает размер объекта в байтах, включая накладные расходы интерпретатора.</text:p>
      <text:p text:style-name="P31"/>
      <text:p text:style-name="P31">Ход выполнения работы</text:p>
      <text:p text:style-name="P28"/>
      <text:p text:style-name="P28">Часть 1. Исследование стандартного списка Python</text:p>
      <text:p text:style-name="P28"/>
      <text:p text:style-name="P28">Написан скрипт, который:</text:p>
      <text:p text:style-name="P28">1. Создает переменную и выводит ее значение и адрес в памяти</text:p>
      <text:p text:style-name="P28">2. Использует ctypes.cast() для доступа к объекту по адресу</text:p>
      <text:p text:style-name="P28">3. Динамически добавляет 20 элементов в список, отслеживая изменение размера</text:p>
      <text:p text:style-name="P28">4. Удаляет 20 элементов из списка, отслеживая изменение размера</text:p>
      <text:p text:style-name="P28"/>
      <text:p text:style-name="P28">Результаты исследования:</text:p>
      <text:p text:style-name="P28">- Стандартный список Python имеет начальный размер 56 байт (для пустого списка)</text:p>
      <text:p text:style-name="P28">- При добавлении элементов размер увеличивается не при каждом добавлении, а при достижении порога</text:p>
      <text:p text:style-name="P28">- Стратегия роста: емкость увеличивается примерно в 1.125 раза (на 12.5%)</text:p>
      <text:p text:style-name="P28">- При удалении элементов размер списка не уменьшается (память не освобождается)</text:p>
      <text:p text:style-name="P28"/>
      <text:p text:style-name="P28">Часть 2. Реализация собственного динамического массива</text:p>
      <text:p text:style-name="P28"/>
      <text:p text:style-name="P28">Реализован класс MyList, который:</text:p>
      <text:p text:style-name="P28">- Использует ctypes.py_object для создания массива фиксированного размера</text:p>
      <text:p text:style-name="P28">- Хранит текущую длину (length) и емкость (capacity)</text:p>
      <text:p text:style-name="P28">- Реализует метод append() с автоматическим расширением (capacity * 2)</text:p>
      <text:p text:style-name="P28"><text:soft-page-break/>- Реализует метод pop() с автоматическим сжатием при length &lt;= capacity // 2 + 1</text:p>
      <text:p text:style-name="P28">- Поддерживает операцию len() через метод __len__</text:p>
      <text:p text:style-name="P28">- Поддерживает доступ по индексу через метод __getitem__</text:p>
      <text:p text:style-name="P28">Стратегия расширения: при заполнении массива емкость удваивается. Стратегия сжатия: при удалении элементов, когда длина становится меньше или равна половине емкости плюс один, массив сжимается.</text:p>
      <text:p text:style-name="P28"/>
      <text:p text:style-name="P20">Листинг программы</text:p>
      <text:p text:style-name="P22"/>
      <text:p text:style-name="P26"><text:span text:style-name="T2">Исходный код программы (листинг) размещен в репозитории </text:span><text:span text:style-name="T8">GitHub </text:span></text:p>
      <text:p text:style-name="P24"><text:span text:style-name="Strong_20_Emphasis"><text:span text:style-name="T9">https://github.com/printRush/BMSTU_Python_SysoevAS</text:span></text:span></text:p>
      <text:p text:style-name="P28"/>
      <text:p text:style-name="P31">Список использованной литературы и материалов</text:p>
      <text:p text:style-name="P28">1. Иванова Г.С. Основы программирования: учебник для вузов. – 4-е изд., стер. – М: изд-во МГТУ им. Н.Э. Баумана, 2007. – 416 с.: ил.</text:p>
      <text:p text:style-name="P28">2. Лутц М. Изучаем Python. – 5-е изд. – М.: Диалектика, 2019. – 1460 с.: ил.</text:p>
      <text:p text:style-name="P28">3. ctypes — A foreign function library for Python. — Текст : электронный // Python Documentation : [сайт]. — URL: https://docs.python.org/3/library/ctypes.html</text:p>
      <text:p text:style-name="P28">4. sys — System-specific parameters and functions. — Текст : электронный // Python Documentation : [сайт]. — URL: https://docs.python.org/3/library/sys.html</text:p>
      <text:p text:style-name="P28">5. Welcome to python.org. — Текст : электронный // The official home of the Python Programming Language : [сайт]. — URL: https://www.python.org/</text:p>
      <text:p text:style-name="P28">6. Git. — Текст : электронный // Git : [сайт]. — URL: https://git-scm.com/</text:p>
      <text:p text:style-name="P28">7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1210d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25M26S</meta:editing-duration>
    <meta:editing-cycles>11</meta:editing-cycles>
    <meta:generator>LibreOffice/7.3.7.2$Linux_X86_64 LibreOffice_project/30$Build-2</meta:generator>
    <dc:title>my_default</dc:title>
    <dc:date>2026-05-16T10:24:11.879989474</dc:date>
    <meta:document-statistic meta:table-count="3" meta:image-count="1" meta:object-count="0" meta:page-count="6" meta:paragraph-count="76" meta:word-count="612" meta:character-count="4664" meta:non-whitespace-character-count="4107"/>
  </office:meta>
</office:document-meta>
</file>